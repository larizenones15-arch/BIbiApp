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500000228BD1F0EDE29FA1814.png" manifest:media-type="image/png"/>
  <manifest:file-entry manifest:full-path="Pictures/100000000000024200000181C5CEF40F92FFEC9D.png" manifest:media-type="image/png"/>
  <manifest:file-entry manifest:full-path="Pictures/10000000000003EF000003255E22341E49C5A70E.png" manifest:media-type="image/png"/>
  <manifest:file-entry manifest:full-path="Pictures/10000000000002EF000001A659ACE872B9692E7D.png" manifest:media-type="image/png"/>
  <manifest:file-entry manifest:full-path="Pictures/100000000000075D000001E63E4DC7D1740A7CF6.png" manifest:media-type="image/png"/>
  <manifest:file-entry manifest:full-path="Pictures/10000000000006780000042D444136C94ED5A188.png" manifest:media-type="image/png"/>
  <manifest:file-entry manifest:full-path="Pictures/100000000000060E000003D22F130D9104BFD08A.png" manifest:media-type="image/png"/>
  <manifest:file-entry manifest:full-path="Pictures/10000000000001120000022FD20E55A19825FD3E.png" manifest:media-type="image/png"/>
  <manifest:file-entry manifest:full-path="Pictures/1000000000000771000002B6E25A8E52B6F93273.png" manifest:media-type="image/png"/>
  <manifest:file-entry manifest:full-path="Pictures/100000000000061600000299E0BB437F7C8671A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5.75pt" svg:stroke-color="#ff0000" draw:marker-start-width="14.26pt" draw:marker-end-width="14.26pt" draw:fill="none" draw:fill-color="#ffffff" draw:textarea-horizontal-align="justify" draw:textarea-vertical-align="middle" draw:auto-grow-height="false" fo:min-height="75.43pt" fo:min-width="75.43pt" fo:padding-top="2.83pt" fo:padding-bottom="2.83pt" fo:padding-left="2.83pt" fo:padding-right="2.83pt"/>
    </style:style>
    <style:style style:name="gr3" style:family="graphic">
      <style:graphic-properties svg:stroke-width="4.31pt" svg:stroke-color="#ff0000" draw:marker-start-width="12.1pt" draw:marker-end-width="12.1pt" draw:fill="none" draw:textarea-horizontal-align="justify" draw:textarea-vertical-align="middle" draw:auto-grow-height="false" fo:min-height="179.74pt" fo:min-width="317.2pt" fo:padding-top="2.13pt" fo:padding-bottom="2.13pt" fo:padding-left="2.13pt" fo:padding-right="2.13pt"/>
    </style:style>
    <style:style style:name="gr4" style:family="graphic">
      <style:graphic-properties svg:stroke-color="#ff0000" draw:fill-color="#ff0000" draw:textarea-horizontal-align="justify" draw:textarea-vertical-align="middle" draw:auto-grow-height="false" fo:min-height="16.92pt" fo:min-width="58.37pt"/>
    </style:style>
    <style:style style:name="gr5" style:family="graphic">
      <style:graphic-properties draw:fill-color="#ff0000" draw:textarea-horizontal-align="justify" draw:textarea-vertical-align="middle" draw:auto-grow-height="false" fo:min-height="16.92pt" fo:min-width="58.37pt"/>
    </style:style>
    <style:style style:name="gr6" style:family="graphic">
      <style:graphic-properties svg:stroke-width="2.89pt" svg:stroke-color="#ff0000" draw:marker-start-width="9.98pt" draw:marker-end-width="9.98pt" draw:fill="none" draw:textarea-horizontal-align="justify" draw:textarea-vertical-align="middle" draw:auto-grow-height="false" fo:min-height="256.9pt" fo:min-width="263.99pt" fo:padding-top="1.42pt" fo:padding-bottom="1.42pt" fo:padding-left="1.42pt" fo:padding-right="1.42pt"/>
    </style:style>
    <style:style style:name="gr7" style:family="graphic">
      <style:graphic-properties svg:stroke-color="#ff0000" draw:fill-color="#ff0000" draw:textarea-horizontal-align="justify" draw:textarea-vertical-align="middle" draw:auto-grow-height="false" fo:min-height="33.82pt" fo:min-width="66.67pt"/>
    </style:style>
    <style:style style:name="gr8" style:family="graphic">
      <style:graphic-properties svg:stroke-width="2.89pt" svg:stroke-color="#ff0000" draw:marker-start-width="9.98pt" draw:marker-end-width="9.98pt" draw:fill="none" draw:textarea-horizontal-align="justify" draw:textarea-vertical-align="middle" draw:auto-grow-height="false" fo:min-height="212.97pt" fo:min-width="68.17pt" fo:padding-top="1.42pt" fo:padding-bottom="1.42pt" fo:padding-left="1.42pt" fo:padding-right="1.42pt"/>
    </style:style>
    <style:style style:name="gr9" style:family="graphic">
      <style:graphic-properties svg:stroke-width="2.89pt" svg:stroke-color="#ff0000" draw:marker-start-width="9.98pt" draw:marker-end-width="9.98pt" draw:fill="none" draw:textarea-horizontal-align="justify" draw:textarea-vertical-align="middle" draw:auto-grow-height="false" fo:min-height="14.54pt" fo:min-width="87.85pt" fo:padding-top="1.42pt" fo:padding-bottom="1.42pt" fo:padding-left="1.42pt" fo:padding-right="1.42pt"/>
    </style:style>
    <style:style style:name="gr10" style:family="graphic">
      <style:graphic-properties svg:stroke-width="2.89pt" svg:stroke-color="#ff0000" draw:marker-start-width="9.98pt" draw:marker-end-width="9.98pt" draw:fill="none" draw:textarea-horizontal-align="justify" draw:textarea-vertical-align="middle" draw:auto-grow-height="false" fo:min-height="249.62pt" fo:min-width="512.08pt" fo:padding-top="1.42pt" fo:padding-bottom="1.42pt" fo:padding-left="1.42pt" fo:padding-right="1.4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67.79pt" svg:height="180.09pt" svg:x="8.45pt" svg:y="32.31pt">
            <draw:image xlink:href="Pictures/100000000000024200000181C5CEF40F92FFEC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12.2pt" svg:height="464.12pt" svg:x="4.45pt" svg:y="268.78pt">
            <draw:image xlink:href="Pictures/10000000000006780000042D444136C94ED5A188.png" xlink:type="simple" xlink:show="embed" xlink:actuate="onLoad" loext:mime-type="image/png">
              <text:p/>
            </draw:image>
          </draw:frame>
          <draw:custom-shape draw:z-index="2" draw:style-name="gr2" draw:text-style-name="P2" svg:width="106.67pt" svg:height="106.67pt" svg:x="113.78pt" svg:y="277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name="Image 3" draw:style-name="gr1" draw:text-style-name="P1" svg:width="935.83pt" svg:height="596.07pt" svg:x="0pt" svg:y="780.77pt">
            <draw:image xlink:href="Pictures/100000000000060E000003D22F130D9104BFD08A.png" xlink:type="simple" xlink:show="embed" xlink:actuate="onLoad" loext:mime-type="image/png">
              <text:p/>
            </draw:image>
          </draw:frame>
          <draw:custom-shape draw:z-index="4" draw:style-name="gr3" draw:text-style-name="P1" svg:width="341.35pt" svg:height="203.9pt" svg:x="273.77pt" svg:y="811.87pt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5" draw:name="Image 4" draw:style-name="gr1" draw:text-style-name="P1" svg:width="1138.08pt" svg:height="296.19pt" svg:x="63.98pt" svg:y="1408pt">
            <draw:image xlink:href="Pictures/100000000000075D000001E63E4DC7D1740A7CF6.png" xlink:type="simple" xlink:show="embed" xlink:actuate="onLoad" loext:mime-type="image/png">
              <text:p/>
            </draw:image>
          </draw:frame>
          <draw:frame draw:z-index="6" draw:name="Image 5" draw:style-name="gr1" draw:text-style-name="P1" svg:width="453.4pt" svg:height="257.19pt" svg:x="121.75pt" svg:y="1742.6pt">
            <draw:image xlink:href="Pictures/10000000000002EF000001A659ACE872B9692E7D.png" xlink:type="simple" xlink:show="embed" xlink:actuate="onLoad" loext:mime-type="image/png">
              <text:p/>
            </draw:image>
          </draw:frame>
          <draw:frame draw:z-index="7" draw:name="Image 6" draw:style-name="gr1" draw:text-style-name="P1" svg:width="165.4pt" svg:height="340.7pt" svg:x="63.1pt" svg:y="2057.13pt">
            <draw:image xlink:href="Pictures/10000000000001120000022FD20E55A19825FD3E.png" xlink:type="simple" xlink:show="embed" xlink:actuate="onLoad" loext:mime-type="image/png">
              <text:p/>
            </draw:image>
          </draw:frame>
          <draw:custom-shape draw:z-index="8" draw:style-name="gr4" draw:text-style-name="P3" svg:width="66.67pt" svg:height="33.82pt" svg:x="158.2pt" svg:y="2239.06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5" draw:text-style-name="P3" svg:width="66.67pt" svg:height="33.82pt" svg:x="146.66pt" svg:y="2297.54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0" draw:name="Image 7" draw:style-name="gr1" draw:text-style-name="P1" svg:width="1150.16pt" svg:height="422.99pt" svg:x="60.43pt" svg:y="2434.73pt">
            <draw:image xlink:href="Pictures/1000000000000771000002B6E25A8E52B6F93273.png" xlink:type="simple" xlink:show="embed" xlink:actuate="onLoad" loext:mime-type="image/png">
              <text:p/>
            </draw:image>
          </draw:frame>
          <draw:custom-shape draw:z-index="11" draw:style-name="gr6" draw:text-style-name="P1" svg:width="263.99pt" svg:height="256.9pt" svg:x="276.43pt" svg:y="2519.77pt">
            <text:p/>
            <draw:enhanced-geometry svg:viewBox="0 0 21600 21600" draw:type="rectangle" draw:enhanced-path="M 0 0 L 21600 0 21600 21600 0 21600 0 0 Z N"/>
          </draw:custom-shape>
          <draw:custom-shape draw:z-index="12" draw:style-name="gr4" draw:text-style-name="P3" svg:width="66.67pt" svg:height="33.82pt" svg:x="780.43pt" svg:y="2518.81pt">
            <text:p/>
  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3" draw:name="Image 8" draw:style-name="gr1" draw:text-style-name="P1" svg:width="940.65pt" svg:height="405.3pt" svg:x="63.98pt" svg:y="2892.78pt">
            <draw:image xlink:href="Pictures/100000000000061600000299E0BB437F7C8671A9.png" xlink:type="simple" xlink:show="embed" xlink:actuate="onLoad" loext:mime-type="image/png">
              <text:p/>
            </draw:image>
          </draw:frame>
          <draw:custom-shape draw:z-index="14" draw:style-name="gr7" draw:text-style-name="P3" svg:width="66.67pt" svg:height="33.82pt" svg:x="809.77pt" svg:y="3157.85pt">
            <text:p/>
  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5" draw:name="Image 9" draw:style-name="gr1" draw:text-style-name="P1" svg:width="582.6pt" svg:height="336.42pt" svg:x="63.98pt" svg:y="3340.8pt">
            <draw:image xlink:href="Pictures/10000000000003C500000228BD1F0EDE29FA1814.png" xlink:type="simple" xlink:show="embed" xlink:actuate="onLoad" loext:mime-type="image/png">
              <text:p/>
            </draw:image>
          </draw:frame>
          <draw:frame draw:z-index="16" draw:name="Image 3" draw:style-name="gr1" draw:text-style-name="P1" svg:width="935.83pt" svg:height="596.07pt" svg:x="64.01pt" svg:y="3750.26pt">
            <draw:image xlink:href="Pictures/100000000000060E000003D22F130D9104BFD08A.png" xlink:type="simple" xlink:show="embed" xlink:actuate="onLoad" loext:mime-type="image/png">
              <text:p/>
            </draw:image>
          </draw:frame>
          <draw:custom-shape draw:z-index="17" draw:style-name="gr8" draw:text-style-name="P1" svg:width="75.54pt" svg:height="220.34pt" svg:x="573.34pt" svg:y="4132.57pt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style-name="gr9" draw:text-style-name="P1" svg:width="90.68pt" svg:height="17.38pt" svg:x="475.54pt" svg:y="4082.14pt">
            <text:p/>
            <draw:enhanced-geometry svg:viewBox="0 0 21600 21600" draw:type="rectangle" draw:enhanced-path="M 0 0 L 21600 0 21600 21600 0 21600 0 0 Z N"/>
          </draw:custom-shape>
          <draw:frame draw:z-index="19" draw:name="Image 8" draw:style-name="gr1" draw:text-style-name="P1" svg:width="940.65pt" svg:height="405.3pt" svg:x="64.01pt" svg:y="4441.44pt">
            <draw:image xlink:href="Pictures/100000000000061600000299E0BB437F7C8671A9.png" xlink:type="simple" xlink:show="embed" xlink:actuate="onLoad" loext:mime-type="image/png">
              <text:p/>
            </draw:image>
          </draw:frame>
          <draw:custom-shape draw:z-index="20" draw:style-name="gr7" draw:text-style-name="P3" svg:width="66.67pt" svg:height="33.82pt" svg:x="809.77pt" svg:y="4723.06pt">
            <text:p/>
  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1" draw:name="Image 10" draw:style-name="gr1" draw:text-style-name="P1" svg:width="607.97pt" svg:height="490.65pt" svg:x="63.98pt" svg:y="4889.59pt">
            <draw:image xlink:href="Pictures/10000000000003EF000003255E22341E49C5A70E.png" xlink:type="simple" xlink:show="embed" xlink:actuate="onLoad" loext:mime-type="image/png">
              <text:p/>
            </draw:image>
          </draw:frame>
          <draw:custom-shape draw:z-index="22" draw:style-name="gr10" draw:text-style-name="P1" svg:width="542.18pt" svg:height="279.72pt" svg:x="81.81pt" svg:y="5093.35pt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SQL</text:p>
          </table:table-cell>
          <table:table-cell table:number-columns-repeated="3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 SidingProductManagement</text:p>
          </table:table-cell>
          <table:table-cell table:number-columns-repeated="3"/>
        </table:table-row>
        <table:table-row table:style-name="ro1" table:number-rows-repeated="40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ype Select * From IssuanceDetails Where PalletNo 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paste all the Pallete No from Siding System</text:p>
          </table:table-cell>
          <table:table-cell table:number-columns-repeated="3"/>
        </table:table-row>
        <table:table-row table:style-name="ro1" table:number-rows-repeated="47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Browser and type </text:p>
          </table:table-cell>
          <table:table-cell/>
          <table:table-cell office:value-type="string" calcext:value-type="string">
            <text:p>http://factoryapps01/SidingProduct/home</text:p>
          </table:table-cell>
          <table:table-cell/>
        </table:table-row>
        <table:table-row table:style-name="ro1" table:number-rows-repeated="27"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gin</text:p>
          </table:table-cell>
          <table:table-cell table:number-columns-repeated="3"/>
        </table:table-row>
        <table:table-row table:style-name="ro1" table:number-rows-repeated="22"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Transmittal then Issuance</text:p>
          </table:table-cell>
          <table:table-cell table:number-columns-repeated="3"/>
        </table:table-row>
        <table:table-row table:style-name="ro1" table:number-rows-repeated="28"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lect Date March 14, 2024</text:p>
          </table:table-cell>
          <table:table-cell/>
          <table:table-cell office:value-type="string" calcext:value-type="string">
            <text:p>Then click Issuance</text:p>
          </table:table-cell>
          <table:table-cell/>
        </table:table-row>
        <table:table-row table:style-name="ro1" table:number-rows-repeated="36"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ick No 10</text:p>
          </table:table-cell>
          <table:table-cell table:number-columns-repeated="3"/>
        </table:table-row>
        <table:table-row table:style-name="ro1" table:number-rows-repeated="33"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py all PalletNo from 16 to 30</text:p>
          </table:table-cell>
          <table:table-cell table:number-columns-repeated="3"/>
        </table:table-row>
        <table:table-row table:style-name="ro1" table:number-rows-repeated="29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 back to step 4 and open the SQ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lect all IssuanceCode AND Right Click then Generate Upd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ge the Issuance Code to IS240314-11</text:p>
          </table:table-cell>
          <table:table-cell table:number-columns-repeated="2"/>
          <table:table-cell office:value-type="string" calcext:value-type="string">
            <text:p>then UPDATE and run</text:p>
          </table:table-cell>
        </table:table-row>
        <table:table-row table:style-name="ro1" table:number-rows-repeated="51"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uble Check in SidingProduct if the IssuanceCode did transfer from Exterior to Til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 the Step 8 and Check if No 16 to 30 is g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n click No 11 if the 16 to 30 is transferred</text:p>
          </table:table-cell>
          <table:table-cell table:number-columns-repeated="3"/>
        </table:table-row>
        <table:table-row table:style-name="ro1" table:number-rows-repeated="35"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9T13:43:37.589000000</meta:creation-date>
    <dc:date>2024-03-19T14:09:35.529000000</dc:date>
    <meta:editing-duration>PT15M13S</meta:editing-duration>
    <meta:editing-cycles>5</meta:editing-cycles>
    <meta:generator>LibreOffice/6.1.2.1$Windows_X86_64 LibreOffice_project/65905a128db06ba48db947242809d14d3f9a93fe</meta:generator>
    <meta:document-statistic meta:table-count="1" meta:cell-count="32" meta:object-count="23"/>
  </office:meta>
</office:document-meta>
</file>